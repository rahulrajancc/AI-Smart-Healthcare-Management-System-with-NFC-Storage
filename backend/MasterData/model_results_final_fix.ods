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5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_results_final_fix" table:style-name="ta1">
        <table:shapes>
          <draw:frame draw:z-index="0" draw:style-name="gr1" draw:text-style-name="P1" svg:width="9.885in" svg:height="4.8945in" svg:x="9.55in" svg:y="0.0417in">
            <draw:object draw:notify-on-update-of-ranges="model_results_final_fix.A1:model_results_final_fix.B1 model_results_final_fix.A2:model_results_final_fix.B7 model_results_final_fix.C1:model_results_final_fix.C1 model_results_final_fix.C2:model_results_final_fix.C7 model_results_final_fix.D1:model_results_final_fix.D1 model_results_final_fix.D2:model_results_final_fix.D7 model_results_final_fix.E1:model_results_final_fix.E1 model_results_final_fix.E2:model_results_final_fix.E7 model_results_final_fix.F1:model_results_final_fix.F1 model_results_final_fix.F2:model_results_final_fix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2" office:value-type="string" calcext:value-type="string">
            <text:p>Drug Reac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2])" office:value-type="float" office:value="1" calcext:value-type="float">
            <text:p>1</text:p>
          </table:table-cell>
          <table:table-cell table:formula="of:=([.E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alar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3])" office:value-type="float" office:value="1" calcext:value-type="float">
            <text:p>1</text:p>
          </table:table-cell>
          <table:table-cell table:formula="of:=([.E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llerg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4])" office:value-type="float" office:value="1" calcext:value-type="float">
            <text:p>1</text:p>
          </table:table-cell>
          <table:table-cell table:formula="of:=([.E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ypothyroidis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5])" office:value-type="float" office:value="1" calcext:value-type="float">
            <text:p>1</text:p>
          </table:table-cell>
          <table:table-cell table:formula="of:=([.E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sorias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6])" office:value-type="float" office:value="1" calcext:value-type="float">
            <text:p>1</text:p>
          </table:table-cell>
          <table:table-cell table:formula="of:=([.E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ER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7])" office:value-type="float" office:value="1" calcext:value-type="float">
            <text:p>1</text:p>
          </table:table-cell>
          <table:table-cell table:formula="of:=([.E7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2T11:37:34.492805358</dc:date>
    <meta:editing-duration>PT1M7S</meta:editing-duration>
    <meta:editing-cycles>1</meta:editing-cycles>
    <meta:document-statistic meta:table-count="1" meta:cell-count="42" meta:object-count="1"/>
    <meta:generator>LibreOffice/25.2.5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5.109cm" svg:height="12.433cm" xlink:href=".." xlink:type="simple" chart:class="chart:bar" chart:style-name="ch1">
        <chart:title svg:x="10.096cm" svg:y="0.384cm" chart:style-name="ch2">
          <text:p>Decision Tree Classifier</text:p>
        </chart:title>
        <chart:legend chart:legend-position="end" svg:x="22.977cm" svg:y="5.17cm" style:legend-expansion="high" chart:style-name="ch3"/>
        <chart:plot-area chart:style-name="ch4" svg:x="1.513cm" svg:y="1.411cm" svg:width="20.962cm" svg:height="9.7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242cm" svg:y="1.416cm" svg:width="20.233cm" svg:height="8.7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0.781cm" svg:y="11.452cm" chart:style-name="ch2">
              <text:p><text:span text:style-name="T1">Expected Result</text:span></text:p>
            </chart:title>
            <chart:categories table:cell-range-address="model_results_final_fix.A2:model_results_final_fix.B7"/>
            <chart:grid chart:style-name="ch6" chart:class="major"/>
          </chart:axis>
          <chart:axis chart:dimension="y" chart:name="primary-y" chart:style-name="ch7">
            <chart:title svg:x="0.451cm" svg:y="7.732cm" chart:style-name="ch8">
              <text:p><text:span text:style-name="T1">AI-Predicted Result</text:span></text:p>
            </chart:title>
            <chart:grid chart:style-name="ch6" chart:class="major"/>
          </chart:axis>
          <chart:axis chart:dimension="z" chart:name="primary-z" chart:style-name="ch5"/>
          <chart:series chart:style-name="ch9" chart:values-cell-range-address="model_results_final_fix.C2:model_results_final_fix.C7" chart:label-cell-address="model_results_final_fix.C1:model_results_final_fix.C1" chart:class="chart:bar">
            <chart:data-point chart:repeated="6"/>
          </chart:series>
          <chart:series chart:style-name="ch10" chart:values-cell-range-address="model_results_final_fix.D2:model_results_final_fix.D7" chart:label-cell-address="model_results_final_fix.D1:model_results_final_fix.D1" chart:class="chart:bar">
            <chart:data-point chart:repeated="6"/>
          </chart:series>
          <chart:series chart:style-name="ch11" chart:values-cell-range-address="model_results_final_fix.E2:model_results_final_fix.E7" chart:label-cell-address="model_results_final_fix.E1:model_results_final_fix.E1" chart:class="chart:bar">
            <chart:data-point chart:repeated="6"/>
          </chart:series>
          <chart:series chart:style-name="ch12" chart:values-cell-range-address="model_results_final_fix.F2:model_results_final_fix.F7" chart:label-cell-address="model_results_final_fix.F1:model_results_final_fix.F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model_results_final_fix.C1:model_results_final_fix.C1</svg:desc>
                </draw:g>
              </table:table-cell>
              <table:table-cell office:value-type="string">
                <text:p>recall</text:p>
                <draw:g>
                  <svg:desc>model_results_final_fix.D1:model_results_final_fix.D1</svg:desc>
                </draw:g>
              </table:table-cell>
              <table:table-cell office:value-type="string">
                <text:p>f1-score</text:p>
                <draw:g>
                  <svg:desc>model_results_final_fix.E1:model_results_final_fix.E1</svg:desc>
                </draw:g>
              </table:table-cell>
              <table:table-cell office:value-type="string">
                <text:p>support</text:p>
                <draw:g>
                  <svg:desc>model_results_final_fix.F1:model_results_final_fix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ug Reaction Drug Reaction</text:p>
                <text:list>
                  <text:list-item>
                    <text:p>Drug Reaction</text:p>
                  </text:list-item>
                  <text:list-item>
                    <text:p>Drug Reaction</text:p>
                  </text:list-item>
                </text:list>
                <draw:g>
                  <svg:desc>model_results_final_fix.A2:model_results_final_fix.B7</svg:desc>
                </draw:g>
              </table:table-cell>
              <table:table-cell office:value-type="float" office:value="1">
                <text:p>1</text:p>
                <draw:g>
                  <svg:desc>model_results_final_fix.C2:model_results_final_fix.C7</svg:desc>
                </draw:g>
              </table:table-cell>
              <table:table-cell office:value-type="float" office:value="1">
                <text:p>1</text:p>
                <draw:g>
                  <svg:desc>model_results_final_fix.D2:model_results_final_fix.D7</svg:desc>
                </draw:g>
              </table:table-cell>
              <table:table-cell office:value-type="float" office:value="1">
                <text:p>1</text:p>
                <draw:g>
                  <svg:desc>model_results_final_fix.E2:model_results_final_fix.E7</svg:desc>
                </draw:g>
              </table:table-cell>
              <table:table-cell office:value-type="float" office:value="1">
                <text:p>1</text:p>
                <draw:g>
                  <svg:desc>model_results_final_fix.F2:model_results_final_fix.F7</svg:desc>
                </draw:g>
              </table:table-cell>
            </table:table-row>
            <table:table-row>
              <table:table-cell office:value-type="string">
                <text:p>Malaria Malaria</text:p>
                <text:list>
                  <text:list-item>
                    <text:p>Malaria</text:p>
                  </text:list-item>
                  <text:list-item>
                    <text:p>Malaria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lergy Allergy</text:p>
                <text:list>
                  <text:list-item>
                    <text:p>Allergy</text:p>
                  </text:list-item>
                  <text:list-item>
                    <text:p>Allergy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ypothyroidism Hypothyroidism</text:p>
                <text:list>
                  <text:list-item>
                    <text:p>Hypothyroidism</text:p>
                  </text:list-item>
                  <text:list-item>
                    <text:p>Hypothyroidism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soriasis Psoriasis</text:p>
                <text:list>
                  <text:list-item>
                    <text:p>Psoriasis</text:p>
                  </text:list-item>
                  <text:list-item>
                    <text:p>Psoriasis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D GERD</text:p>
                <text:list>
                  <text:list-item>
                    <text:p>GERD</text:p>
                  </text:list-item>
                  <text:list-item>
                    <text:p>GER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